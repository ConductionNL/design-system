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85mm" fo:page-height="55mm" style:print-orientation="landscape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business-cards · Conduction</dc:title>
    <dc:creator>Conduction</dc:creator>
  </office:meta>
</office:document-meta>
</file>