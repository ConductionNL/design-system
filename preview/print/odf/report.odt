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hex-forest.svg" manifest:media-type="image/svg+xml"/>
  <manifest:file-entry manifest:full-path="Pictures/hex-cobalt.svg" manifest:media-type="image/svg+xml"/>
  <manifest:file-entry manifest:full-path="Pictures/hex-orange.svg" manifest:media-type="image/svg+xml"/>
  <manifest:file-entry manifest:full-path="Pictures/honeycomb-scatter.svg" manifest:media-type="image/svg+xml"/>
  <manifest:file-entry manifest:full-path="Pictures/honeycomb-page.svg" manifest:media-type="image/svg+xml"/>
  <manifest:file-entry manifest:full-path="Pictures/linkedin-conduction.svg" manifest:media-type="image/svg+xml"/>
  <manifest:file-entry manifest:full-path="Pictures/bar-cobalt.svg" manifest:media-type="image/svg+xml"/>
  <manifest:file-entry manifest:full-path="Pictures/bar-orange.svg" manifest:media-type="image/svg+xml"/>
  <manifest:file-entry manifest:full-path="Pictures/hairline-cobalt-100.svg" manifest:media-type="image/svg+xml"/>
  <manifest:file-entry manifest:full-path="Pictures/honeycomb-page-a4.png" manifest:media-type="image/png"/>
  <manifest:file-entry manifest:full-path="Pictures/card-white.svg" manifest:media-type="image/svg+xml"/>
  <manifest:file-entry manifest:full-path="Pictures/card-white.png" manifest:media-type="image/png"/>
  <manifest:file-entry manifest:full-path="Pictures/summary-chrome.png" manifest:media-type="image/png"/>
  <manifest:file-entry manifest:full-path="Pictures/tpl-index-chrome.png" manifest:media-type="image/png"/>
  <manifest:file-entry manifest:full-path="Pictures/tpl-quote-chrome.png" manifest:media-type="image/png"/>
  <manifest:file-entry manifest:full-path="Pictures/tpl-diagram-chrome.png" manifest:media-type="image/png"/>
  <manifest:file-entry manifest:full-path="Pictures/tpl-table-chrome.png" manifest:media-type="image/png"/>
  <manifest:file-entry manifest:full-path="Pictures/tpl-info-std-chrome.png" manifest:media-type="image/png"/>
  <manifest:file-entry manifest:full-path="Pictures/tpl-info-playful-chrome.png" manifest:media-type="image/png"/>
  <manifest:file-entry manifest:full-path="Pictures/tpl-sources-chrome.png" manifest:media-type="image/png"/>
  <manifest:file-entry manifest:full-path="Pictures/tpl-attachments-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automatic-styles>
    <!-- Master-page transitions: setting style:master-page-name on a
         paragraph forces a page break and binds the next page to the
         named master page. Page 1 binds via the first paragraph below
         (ToCover); subsequent pages bind via ToSummary / ToBody / ToBack. -->
    <style:style style:name="ToCover" style:family="paragraph" style:parent-style-name="CrumbMono" style:master-page-name="MP_Cover"/>
    <style:style style:name="ToIndex" style:family="paragraph" style:parent-style-name="RunningChapter" style:master-page-name="MP_Index"/>
    <style:style style:name="ToSummary" style:family="paragraph" style:parent-style-name="RunningChapter" style:master-page-name="MP_Summary"/>
    <style:style style:name="ToBody" style:family="paragraph" style:parent-style-name="RunningChapter" style:master-page-name="MP_Body"/>
    <style:style style:name="ToQuote" style:family="paragraph" style:parent-style-name="RunningChapter" style:master-page-name="MP_Quote"/>
    <style:style style:name="ToDiagram" style:family="paragraph" style:parent-style-name="RunningChapter" style:master-page-name="MP_Diagram"/>
    <style:style style:name="ToTable" style:family="paragraph" style:parent-style-name="RunningChapter" style:master-page-name="MP_Table"/>
    <style:style style:name="ToInfoStd" style:family="paragraph" style:parent-style-name="RunningChapter" style:master-page-name="MP_InfoStd"/>
    <style:style style:name="ToInfoPlayful" style:family="paragraph" style:parent-style-name="RunningChapter" style:master-page-name="MP_InfoPlayful"/>
    <style:style style:name="ToSources" style:family="paragraph" style:parent-style-name="RunningChapter" style:master-page-name="MP_Sources"/>
    <style:style style:name="ToAttachments" style:family="paragraph" style:parent-style-name="RunningChapter" style:master-page-name="MP_Attachments"/>
    <style:style style:name="ToBack" style:family="paragraph" style:parent-style-name="BackH2" style:master-page-name="MP_Back"/>
    <!-- Cover "meta" three-column row at the bottom of the cover -->
    <style:style style:name="MetaCellLabel" style:family="paragraph" style:parent-style-name="MetaLabel"/>
    <style:style style:name="MetaCellValue" style:family="paragraph" style:parent-style-name="MetaValue"/>
    <!-- Top-spacer so the cover meta row sits near the bottom (push) -->
    <style:style style:name="CoverPush" style:family="paragraph" style:parent-style-name="Standard">
      <style:paragraph-properties fo:margin-top="11cm" fo:margin-bottom="0cm"/>
    </style:style>
    <!-- Meta table (3 columns, white-on-dark) -->
    <style:style style:name="TMeta" style:family="table">
      <style:table-properties style:width="16.6cm" table:align="margins"/>
    </style:style>
    <style:style style:name="TMeta.A" style:family="table-column">
      <style:table-column-properties style:column-width="5.53cm"/>
    </style:style>
    <style:style style:name="TMeta.Cell" style:family="table-cell">
      <style:table-cell-properties fo:padding="0cm 0.3cm 0cm 0cm" fo:border-top="0.02cm solid #4D69A4"/>
    </style:style>
    <!-- Running header docID right-align -->
    <style:style style:name="RunningRight" style:family="paragraph" style:parent-style-name="RunningChapter">
      <style:paragraph-properties fo:text-align="end" fo:margin-bottom="1cm" fo:padding-bottom="0.2cm" fo:border-bottom="0.03cm solid #DCE3F0"/>
    </style:style>
    <!-- Page-footer line on each body page (cobalt-100 separator + mono ID) -->
    <style:style style:name="PageFootSpaced" style:family="paragraph" style:parent-style-name="PageFootR">
      <style:paragraph-properties fo:margin-top="2cm" fo:padding-top="0.2cm" fo:border-top="0.03cm solid #DCE3F0"/>
    </style:style>
    <!-- Avatar hex frame style (cobalt hex with monogram overlay) -->
    <style:style style:name="HexInline" style:family="graphic">
      <style:graphic-properties style:wrap="none" style:vertical-pos="from-top" style:vertical-rel="paragraph-content" style:horizontal-pos="from-left" style:horizontal-rel="paragraph"/>
    </style:style>
    <!-- A faint cobalt-100 separator paragraph used inside the summary panel -->
    <style:style style:name="SignedDivider" style:family="paragraph" style:parent-style-name="Standard">
      <style:paragraph-properties fo:margin-top="0.5cm" fo:padding-top="0.4cm" fo:border-top="0.03cm solid #DCE3F0" fo:margin-bottom="0cm"/>
    </style:style>
  </office:automatic-styles>
  <office:body>
    <office:text>
      <!-- ============================================================
           Page 1: COVER  (cobalt-900 background)
           ============================================================ -->
      <text:p text:style-name="ToCover">
        <!-- Category mark: forest hex, anchored top-right of page 1 -->
        <draw:frame draw:style-name="HexAnchored" draw:name="CategoryMark" svg:width="1.8cm" svg:height="2.07cm" svg:x="16.9cm" svg:y="2.2cm" text:anchor-type="page" text:anchor-page-number="1">
          <draw:image xlink:href="Pictures/hex-forest.svg" xlink:type="simple" xlink:show="embed" xlink:actuate="onLoad"/>
        </draw:frame>
        <!-- Honeycomb scatter: anchored bottom-right of page 1, sits behind text -->
        <draw:frame draw:style-name="HexBgAnchored" draw:name="CoverBackdrop" svg:width="13cm" svg:height="7.3cm" svg:x="9cm" svg:y="20.4cm" text:anchor-type="page" text:anchor-page-number="1">
          <draw:image xlink:href="Pictures/honeycomb-scatter.svg" xlink:type="simple" xlink:show="embed" xlink:actuate="onLoad"/>
        </draw:frame>
        Conduction · {{ doc-type }} · {{ #ID }}
      </text:p>
      <text:p text:style-name="CoverH1">{{ Title goes here. }}</text:p>
      <text:p text:style-name="CoverSub">{{ One-line lede, the answer up front. }}</text:p>
      <text:p text:style-name="CoverPush"/>
      <table:table table:name="CoverMeta" table:style-name="TMeta">
        <table:table-column table:style-name="TMeta.A"/>
        <table:table-column table:style-name="TMeta.A"/>
        <table:table-column table:style-name="TMeta.A"/>
        <table:table-row>
          <table:table-cell table:style-name="TMeta.Cell">
            <text:p text:style-name="MetaCellLabel">Datum</text:p>
            <text:p text:style-name="MetaCellValue">{{ DD month YYYY }}</text:p>
          </table:table-cell>
          <table:table-cell table:style-name="TMeta.Cell">
            <text:p text:style-name="MetaCellLabel">Voor</text:p>
            <text:p text:style-name="MetaCellValue">{{ Recipient + role }}</text:p>
          </table:table-cell>
          <table:table-cell table:style-name="TMeta.Cell">
            <text:p text:style-name="MetaCellLabel">Door</text:p>
            <text:p text:style-name="MetaCellValue">{{ Author + role }}</text:p>
          </table:table-cell>
        </table:table-row>
      </table:table>
      <!-- ============================================================
           Page 2: INDEX  (chrome PNG bg + editable overlays)
           ============================================================ -->
      <text:p text:style-name="ToIndex">
        <draw:frame draw:style-name="OverlayWhite" draw:name="IndexRH" svg:width="16.6cm" svg:height="0.45cm" svg:x="2.2cm" svg:y="1.6cm" text:anchor-type="page" text:anchor-page-number="2">
          <draw:text-box>
            <text:p text:style-name="RunningChapter"># {{ chapter }}<text:tab/><text:tab/><text:tab/><text:tab/><text:tab/><text:tab/><text:span text:style-name="DocIdOrange">{{ #ID }} · p. 02</text:span></text:p>
          </draw:text-box>
        </draw:frame>
        <draw:frame draw:style-name="OverlayWhite" draw:name="IndexH2" svg:width="14cm" svg:height="1cm" svg:x="2.2cm" svg:y="3.4cm" text:anchor-type="page" text:anchor-page-number="2">
          <draw:text-box>
            <text:p text:style-name="BackH2">Inhoud</text:p>
          </draw:text-box>
        </draw:frame>
        <draw:frame draw:style-name="OverlayWhite" draw:name="IndexFoot" svg:width="16.6cm" svg:height="0.6cm" svg:x="2.2cm" svg:y="26.6cm" text:anchor-type="page" text:anchor-page-number="2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3: SUMMARY  (white with honeycomb veil, signed block)
           ============================================================ -->
      <!-- ==== Summary page: Path 2 ====
           The visual chrome (veil + white card + cobalt-700 left bar +
           bullet hexes + 'SAMENVATTING VOOR MANAGEMENT' eyebrow +
           static Dutch bullet labels + hairline divider + 'Opgesteld'
           label) is baked into Pictures/summary-chrome.png and set as
           the PL_Summary page background. All editable {{ placeholder }}
           text lives in anchored text frames whose svg:x / svg:y match
           coordinates measured directly off the HTML element via Playwright. -->
      <text:p text:style-name="ToSummary">
        <!-- Running header: chapter on left, doc-id orange on right.
             Anchored to cover the running text in the chrome PNG.
             Coords measured from HTML via Playwright. -->
        <draw:frame draw:style-name="OverlayWhite" draw:name="RunningHeaderOL" svg:width="16.6cm" svg:height="0.45cm" svg:x="2.2cm" svg:y="1.6cm" text:anchor-type="page" text:anchor-page-number="3">
          <draw:text-box>
            <text:p text:style-name="RunningChapter"># {{ chapter }}<text:tab/><text:tab/><text:tab/><text:tab/><text:tab/><text:tab/><text:span text:style-name="DocIdOrange">{{ #ID }} · p. 03</text:span></text:p>
          </draw:text-box>
        </draw:frame>

        <!-- Outcome H2 (HTML measurement: y=4.39, h=0.79). Adding small
             vertical pad to ensure baked text below is covered. -->
        <draw:frame draw:style-name="OverlayWhite" draw:name="OutcomeH2OL" svg:width="14.9cm" svg:height="0.9cm" svg:x="3.11cm" svg:y="4.35cm" text:anchor-type="page" text:anchor-page-number="3">
          <draw:text-box>
            <text:p text:style-name="SummaryH2">{{ Outcome sentence with period. }}</text:p>
          </draw:text-box>
        </draw:frame>

        <!-- Body para (y=5.58, h=1.13) -->
        <draw:frame draw:style-name="OverlayWhite" draw:name="BodyParaOL" svg:width="14.9cm" svg:height="1.25cm" svg:x="3.11cm" svg:y="5.5cm" text:anchor-type="page" text:anchor-page-number="3">
          <draw:text-box>
            <text:p text:style-name="SummaryBody">{{ One paragraph, two to three sentences. Person-voice; explains the situation, the move, and what changes. }}</text:p>
          </draw:text-box>
        </draw:frame>

        <!-- Bullet 1 placeholder text (right of bold 'Probleem:').
             Label ends at x=5.76cm; placeholder starts after gap. -->
        <draw:frame draw:style-name="OverlayWhite" draw:name="Bullet1OL" svg:width="12cm" svg:height="0.6cm" svg:x="5.96cm" svg:y="7cm" text:anchor-type="page" text:anchor-page-number="3">
          <draw:text-box>
            <text:p text:style-name="SummaryBody">{{ what's broken now, one line }}</text:p>
          </draw:text-box>
        </draw:frame>

        <!-- Bullet 2 placeholder text (right of 'Aanpak:', ends x=5.44cm) -->
        <draw:frame draw:style-name="OverlayWhite" draw:name="Bullet2OL" svg:width="12cm" svg:height="0.6cm" svg:x="5.64cm" svg:y="7.82cm" text:anchor-type="page" text:anchor-page-number="3">
          <draw:text-box>
            <text:p text:style-name="SummaryBody">{{ what we're doing about it, one line }}</text:p>
          </draw:text-box>
        </draw:frame>

        <!-- Bullet 3 placeholder text (right of 'Wat je ervoor terugkrijgt:', ends x=8.24cm) -->
        <draw:frame draw:style-name="OverlayWhite" draw:name="Bullet3OL" svg:width="9.5cm" svg:height="0.6cm" svg:x="8.44cm" svg:y="8.63cm" text:anchor-type="page" text:anchor-page-number="3">
          <draw:text-box>
            <text:p text:style-name="SummaryBody">{{ the outcome, one line }}</text:p>
          </draw:text-box>
        </draw:frame>

        <!-- Author name + role (HTML measurement: y=10.53, h=0.53 each) -->
        <draw:frame draw:style-name="OverlayWhite" draw:name="AuthorNameOL" svg:width="9.7cm" svg:height="1.1cm" svg:x="4.9cm" svg:y="10.5cm" text:anchor-type="page" text:anchor-page-number="3">
          <draw:text-box>
            <text:p text:style-name="SignedName">{{ Author name }}</text:p>
            <text:p text:style-name="SignedRole">{{ role }} · Conduction</text:p>
          </draw:text-box>
        </draw:frame>

        <!-- Date (HTML measurement: y=11.01, w=2.93) -->
        <draw:frame draw:style-name="OverlayWhite" draw:name="OpgesteldDateOL" svg:width="3cm" svg:height="0.5cm" svg:x="15.04cm" svg:y="11cm" text:anchor-type="page" text:anchor-page-number="3">
          <draw:text-box>
            <text:p text:style-name="SignedMetaValue">{{ DD month YYYY }}</text:p>
          </draw:text-box>
        </draw:frame>

        <!-- Page footer (HTML measurement: y=26.6, h=0.9) -->
        <draw:frame draw:style-name="OverlayWhite" draw:name="PageFootOL" svg:width="16.6cm" svg:height="0.6cm" svg:x="2.2cm" svg:y="26.6cm" text:anchor-type="page" text:anchor-page-number="3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3: BODY content
           ============================================================ -->
      <text:p text:style-name="ToBody">
        <text:span># {{ chapter }}</text:span>
        <text:tab/>
        <text:tab/>
        <text:tab/>
        <text:tab/>
        <text:tab/>
        <text:tab/>
        <text:span text:style-name="DocIdOrange">{{ #ID }} · p. 04</text:span>
      </text:p>
      <text:p text:style-name="BodyH2">{{ Section heading }}</text:p>
      <text:p text:style-name="BodyText">{{ Lead-in paragraph, two short sentences. Active voice, one claim per sentence. }}</text:p>
      <text:p text:style-name="BodyQuote">“{{ Quote, lifted verbatim from a customer interview. }}” — {{ Speaker, role }}</text:p>
      <text:p text:style-name="BodyH3">{{ Subhead }}</text:p>
      <text:p text:style-name="BodyText">{{ One claim per sentence. Under 16 words. Active voice. }}</text:p>
      <text:p text:style-name="BodyBullet">⬢  {{ Bullet 1 }}</text:p>
      <text:p text:style-name="BodyBullet">⬢  {{ Bullet 2 }}</text:p>
      <text:p text:style-name="BodyBullet">⬢  {{ Bullet 3 }}</text:p>
      <text:p text:style-name="CalloutLabel">Wat we niet doen</text:p>
      <text:p text:style-name="CalloutBody">{{ Honest disclosure of what's out of scope. One short paragraph. Builds trust faster than three claims. }}</text:p>
      <text:p text:style-name="BodyH3">{{ Subhead 2 }}</text:p>
      <text:p text:style-name="BodyText">{{ Closing paragraph for this body page. Short. Followed by the back-page action list. }}</text:p>
      <text:p text:style-name="PageFootSpaced">conduction.nl · {{ #ID }}<text:tab/><text:tab/><text:tab/><text:tab/><text:tab/><text:tab/>⬢ <text:span text:style-name="DocIdOrange">⬢</text:span> ⬢</text:p>
      <!-- ============================================================
           Page 5: QUOTE  (chrome PNG bg + editable overlays)
           ============================================================ -->
      <text:p text:style-name="ToQuote">
        <draw:frame draw:style-name="OverlayWhite" draw:name="QuoteRH" svg:width="16.6cm" svg:height="0.45cm" svg:x="2.2cm" svg:y="1.6cm" text:anchor-type="page" text:anchor-page-number="5">
          <draw:text-box>
            <text:p text:style-name="RunningChapter"># {{ chapter }}<text:tab/><text:tab/><text:tab/><text:tab/><text:tab/><text:tab/><text:span text:style-name="DocIdOrange">{{ #ID }} · p. 05</text:span></text:p>
          </draw:text-box>
        </draw:frame>
        <draw:frame draw:style-name="OverlayWhite" draw:name="QuoteH2" svg:width="14cm" svg:height="1cm" svg:x="2.2cm" svg:y="3.4cm" text:anchor-type="page" text:anchor-page-number="5">
          <draw:text-box>
            <text:p text:style-name="BackH2">{{ Stemmen uit het veld }}</text:p>
          </draw:text-box>
        </draw:frame>
        <draw:frame draw:style-name="OverlayWhite" draw:name="QuoteFoot" svg:width="16.6cm" svg:height="0.6cm" svg:x="2.2cm" svg:y="26.6cm" text:anchor-type="page" text:anchor-page-number="5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6: DIAGRAM  (chrome PNG bg + editable overlays)
           ============================================================ -->
      <text:p text:style-name="ToDiagram">
        <draw:frame draw:style-name="OverlayWhite" draw:name="DiagramRH" svg:width="16.6cm" svg:height="0.45cm" svg:x="2.2cm" svg:y="1.6cm" text:anchor-type="page" text:anchor-page-number="6">
          <draw:text-box>
            <text:p text:style-name="RunningChapter"># {{ chapter }}<text:tab/><text:tab/><text:tab/><text:tab/><text:tab/><text:tab/><text:span text:style-name="DocIdOrange">{{ #ID }} · p. 06</text:span></text:p>
          </draw:text-box>
        </draw:frame>
        <draw:frame draw:style-name="OverlayWhite" draw:name="DiagramH2" svg:width="16cm" svg:height="1cm" svg:x="2.2cm" svg:y="3.4cm" text:anchor-type="page" text:anchor-page-number="6">
          <draw:text-box>
            <text:p text:style-name="BackH2">{{ Drie manieren om dit te tekenen }}</text:p>
          </draw:text-box>
        </draw:frame>
        <draw:frame draw:style-name="OverlayWhite" draw:name="DiagramFoot" svg:width="16.6cm" svg:height="0.6cm" svg:x="2.2cm" svg:y="26.6cm" text:anchor-type="page" text:anchor-page-number="6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7: TABLE  (chrome PNG bg + editable overlays)
           ============================================================ -->
      <text:p text:style-name="ToTable">
        <draw:frame draw:style-name="OverlayWhite" draw:name="TableRH" svg:width="16.6cm" svg:height="0.45cm" svg:x="2.2cm" svg:y="1.6cm" text:anchor-type="page" text:anchor-page-number="7">
          <draw:text-box>
            <text:p text:style-name="RunningChapter"># {{ chapter }}<text:tab/><text:tab/><text:tab/><text:tab/><text:tab/><text:tab/><text:span text:style-name="DocIdOrange">{{ #ID }} · p. 07</text:span></text:p>
          </draw:text-box>
        </draw:frame>
        <draw:frame draw:style-name="OverlayWhite" draw:name="TableH2" svg:width="14cm" svg:height="1cm" svg:x="2.2cm" svg:y="3.4cm" text:anchor-type="page" text:anchor-page-number="7">
          <draw:text-box>
            <text:p text:style-name="BackH2">{{ Tijdlijn }}</text:p>
          </draw:text-box>
        </draw:frame>
        <draw:frame draw:style-name="OverlayWhite" draw:name="TableFoot" svg:width="16.6cm" svg:height="0.6cm" svg:x="2.2cm" svg:y="26.6cm" text:anchor-type="page" text:anchor-page-number="7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8: INFO BOX STANDARD  (chrome PNG bg + editable overlays)
           ============================================================ -->
      <text:p text:style-name="ToInfoStd">
        <draw:frame draw:style-name="OverlayWhite" draw:name="InfoStdRH" svg:width="16.6cm" svg:height="0.45cm" svg:x="2.2cm" svg:y="1.6cm" text:anchor-type="page" text:anchor-page-number="8">
          <draw:text-box>
            <text:p text:style-name="RunningChapter"># {{ chapter }}<text:tab/><text:tab/><text:tab/><text:tab/><text:tab/><text:tab/><text:span text:style-name="DocIdOrange">{{ #ID }} · p. 08</text:span></text:p>
          </draw:text-box>
        </draw:frame>
        <draw:frame draw:style-name="OverlayWhite" draw:name="InfoStdH2" svg:width="14cm" svg:height="1cm" svg:x="2.2cm" svg:y="3.4cm" text:anchor-type="page" text:anchor-page-number="8">
          <draw:text-box>
            <text:p text:style-name="BackH2">{{ Wat je moet weten }}</text:p>
          </draw:text-box>
        </draw:frame>
        <draw:frame draw:style-name="OverlayWhite" draw:name="InfoStdFoot" svg:width="16.6cm" svg:height="0.6cm" svg:x="2.2cm" svg:y="26.6cm" text:anchor-type="page" text:anchor-page-number="8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9: INFO BOX PLAYFUL  (chrome PNG bg + editable overlays)
           ============================================================ -->
      <text:p text:style-name="ToInfoPlayful">
        <draw:frame draw:style-name="OverlayWhite" draw:name="InfoPlayRH" svg:width="16.6cm" svg:height="0.45cm" svg:x="2.2cm" svg:y="1.6cm" text:anchor-type="page" text:anchor-page-number="9">
          <draw:text-box>
            <text:p text:style-name="RunningChapter"># {{ chapter }}<text:tab/><text:tab/><text:tab/><text:tab/><text:tab/><text:tab/><text:span text:style-name="DocIdOrange">{{ #ID }} · p. 09</text:span></text:p>
          </draw:text-box>
        </draw:frame>
        <draw:frame draw:style-name="OverlayWhite" draw:name="InfoPlayH2" svg:width="14cm" svg:height="1cm" svg:x="2.2cm" svg:y="3.4cm" text:anchor-type="page" text:anchor-page-number="9">
          <draw:text-box>
            <text:p text:style-name="BackH2">{{ Wat je moet weten, met meer lef }}</text:p>
          </draw:text-box>
        </draw:frame>
        <draw:frame draw:style-name="OverlayWhite" draw:name="InfoPlayFoot" svg:width="16.6cm" svg:height="0.6cm" svg:x="2.2cm" svg:y="26.6cm" text:anchor-type="page" text:anchor-page-number="9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10: SOURCES  (chrome PNG bg + editable overlays)
           ============================================================ -->
      <text:p text:style-name="ToSources">
        <draw:frame draw:style-name="OverlayWhite" draw:name="SourcesRH" svg:width="16.6cm" svg:height="0.45cm" svg:x="2.2cm" svg:y="1.6cm" text:anchor-type="page" text:anchor-page-number="10">
          <draw:text-box>
            <text:p text:style-name="RunningChapter"># {{ chapter }}<text:tab/><text:tab/><text:tab/><text:tab/><text:tab/><text:tab/><text:span text:style-name="DocIdOrange">{{ #ID }} · p. 10</text:span></text:p>
          </draw:text-box>
        </draw:frame>
        <draw:frame draw:style-name="OverlayWhite" draw:name="SourcesFoot" svg:width="16.6cm" svg:height="0.6cm" svg:x="2.2cm" svg:y="26.6cm" text:anchor-type="page" text:anchor-page-number="10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11: ATTACHMENTS  (chrome PNG bg + editable overlays)
           ============================================================ -->
      <text:p text:style-name="ToAttachments">
        <draw:frame draw:style-name="OverlayWhite" draw:name="AttRH" svg:width="16.6cm" svg:height="0.45cm" svg:x="2.2cm" svg:y="1.6cm" text:anchor-type="page" text:anchor-page-number="11">
          <draw:text-box>
            <text:p text:style-name="RunningChapter"># {{ chapter }}<text:tab/><text:tab/><text:tab/><text:tab/><text:tab/><text:tab/><text:span text:style-name="DocIdOrange">{{ #ID }} · p. 11</text:span></text:p>
          </draw:text-box>
        </draw:frame>
        <draw:frame draw:style-name="OverlayWhite" draw:name="AttFoot" svg:width="16.6cm" svg:height="0.6cm" svg:x="2.2cm" svg:y="26.6cm" text:anchor-type="page" text:anchor-page-number="11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12: BACK (cobalt-50 background, "wat is volgende")
           Cards and contact block are anchored draw:frame overlays at
           fixed page coordinates so the white bg + orange/cobalt bar
           render visibly against the tinted stage. The H2 + sub + foot
           stay in regular flow so the user can edit copy freely.
           ============================================================ -->
      <text:p text:style-name="ToBack">
        <!-- ===== Next-step cards: 3 anchored white-card frames + 3 orange-bar overlays ===== -->
        <draw:frame draw:style-name="WhiteCard" draw:name="NextCard1" svg:width="5.13cm" svg:height="5.8cm" svg:x="2.2cm" svg:y="7cm" text:anchor-type="page" text:anchor-page-number="12">
          <draw:text-box>
            <text:p text:style-name="NextCardNum">01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2" svg:width="5.13cm" svg:height="5.8cm" svg:x="7.94cm" svg:y="7cm" text:anchor-type="page" text:anchor-page-number="12">
          <draw:text-box>
            <text:p text:style-name="NextCardNum">02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3" svg:width="5.13cm" svg:height="5.8cm" svg:x="13.68cm" svg:y="7cm" text:anchor-type="page" text:anchor-page-number="12">
          <draw:text-box>
            <text:p text:style-name="NextCardNum">03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!-- Orange left-bars, drawn AFTER the cards so they overlay the left edge -->
        <draw:frame draw:style-name="HexAnchored" draw:name="NextBar1" svg:width="0.15cm" svg:height="5.8cm" svg:x="2.2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2" svg:width="0.15cm" svg:height="5.8cm" svg:x="7.94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3" svg:width="0.15cm" svg:height="5.8cm" svg:x="13.68cm" svg:y="7cm" text:anchor-type="page" text:anchor-page-number="12">
          <draw:image xlink:href="Pictures/bar-orange.svg" xlink:type="simple" xlink:show="embed" xlink:actuate="onLoad"/>
        </draw:frame>

        <!-- ===== Contact block: white card with text-only content, plus
             standalone hex avatar + QR anchored separately. Nested
             draw:frame > text-box > table > frame > image doesn't
             render the inner image in LibreOffice; lifting the hex and
             QR to page-level anchors makes them visible. ===== -->
        <draw:frame draw:style-name="WhiteCard" draw:name="ContactCard" svg:width="16.6cm" svg:height="4.5cm" svg:x="2.2cm" svg:y="14.5cm" text:anchor-type="page" text:anchor-page-number="12">
          <draw:text-box>
            <text:p text:style-name="ContactNameIn">{{ Author name }}</text:p>
            <text:p text:style-name="ContactRoleIn">{{ role }}, Conduction</text:p>
            <text:p text:style-name="ContactLinesIn">{{ email }}</text:p>
            <text:p text:style-name="ContactLinesIn">{{ phone }}</text:p>
          </draw:text-box>
        </draw:frame>
        <draw:frame draw:style-name="HexAnchored" draw:name="ContactAvatarHex" svg:width="1.6cm" svg:height="1.84cm" svg:x="3.4cm" svg:y="15.4cm" text:anchor-type="page" text:anchor-page-number="12">
          <draw:image xlink:href="Pictures/hex-cobalt.svg" xlink:type="simple" xlink:show="embed" xlink:actuate="onLoad"/>
        </draw:frame>
        <draw:frame draw:style-name="HexAnchored" draw:name="ContactQR" svg:width="2.2cm" svg:height="2.2cm" svg:x="16.2cm" svg:y="15.2cm" text:anchor-type="page" text:anchor-page-number="12">
          <draw:image xlink:href="Pictures/linkedin-conduction.svg" xlink:type="simple" xlink:show="embed" xlink:actuate="onLoad"/>
        </draw:frame>
        <!-- Back-page foot, anchored to the bottom margin -->
        <draw:frame draw:style-name="HexAnchored" draw:name="BackFootFrame" svg:width="16.6cm" svg:height="1cm" svg:x="2.2cm" svg:y="26.5cm" text:anchor-type="page" text:anchor-page-number="12">
          <draw:text-box>
            <text:p text:style-name="BackFoot">Conduction BV · conduction.nl · this report is a working document, mark it up</text:p>
          </draw:text-box>
        </draw:frame>
        {{ What's next. }}
      </text:p>
      <text:p text:style-name="BackSub">{{ One-line framing: three concrete steps, one owner per step, one date per step. No "we kunnen aanbieden", concrete movements that can happen now.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styles>
    <style:default-style style:family="paragraph">
      <style:text-properties style:font-name="Figtree" fo:font-size="10pt" fo:color="#0A172F"/>
      <style:paragraph-properties fo:line-height="150%" fo:margin-top="0cm" fo:margin-bottom="0.2cm"/>
    </style:default-style>
    <style:style style:name="Standard" style:family="paragraph" style:class="text"/>
    <!-- ==== Cover styles ==== -->
    <style:style style:name="CrumbMono" style:family="paragraph" style:parent-style-name="Standard">
      <style:text-properties style:font-name="IBM Plex Mono" fo:font-size="7pt" fo:color="#8095BD" fo:letter-spacing="0.1em" fo:text-transform="uppercase"/>
      <style:paragraph-properties fo:margin-bottom="0cm"/>
    </style:style>
    <style:style style:name="CoverH1" style:family="paragraph" style:parent-style-name="Standard">
      <style:text-properties style:font-name="Figtree" fo:font-size="38pt" fo:font-weight="bold" fo:color="#FFFFFF" fo:letter-spacing="-0.02em"/>
      <style:paragraph-properties fo:line-height="105%" fo:margin-top="1.4cm" fo:margin-bottom="0.6cm"/>
    </style:style>
    <style:style style:name="CoverSub" style:family="paragraph" style:parent-style-name="Standard">
      <style:text-properties style:font-name="Figtree" fo:font-size="13pt" fo:color="#DCE3F0"/>
      <style:paragraph-properties fo:line-height="140%" fo:margin-bottom="0.5cm"/>
    </style:style>
    <style:style style:name="MetaLabel" style:family="paragraph" style:parent-style-name="Standard">
      <style:text-properties style:font-name="IBM Plex Mono" fo:font-size="7pt" fo:color="#8095BD" fo:letter-spacing="0.06em" fo:text-transform="uppercase"/>
      <style:paragraph-properties fo:margin-top="0cm" fo:margin-bottom="0.1cm"/>
    </style:style>
    <style:style style:name="MetaValue" style:family="paragraph" style:parent-style-name="Standard">
      <style:text-properties style:font-name="Figtree" fo:font-size="11pt" fo:color="#FFFFFF"/>
      <style:paragraph-properties fo:margin-bottom="0cm"/>
    </style:style>
    <!-- ==== Body running header ==== -->
    <style:style style:name="RunningChapter" style:family="paragraph" style:parent-style-name="Standard">
      <style:text-properties style:font-name="IBM Plex Mono" fo:font-size="7pt" fo:color="#4D69A4" fo:letter-spacing="0.1em" fo:text-transform="uppercase"/>
      <style:paragraph-properties fo:margin-top="0cm" fo:margin-bottom="1cm" fo:padding-bottom="0.2cm" fo:border-bottom="0.03cm solid #DCE3F0"/>
    </style:style>
    <!-- ==== Summary panel ==== -->
    <style:style style:name="SummaryLabel" style:family="paragraph" style:parent-style-name="Standard">
      <style:text-properties style:font-name="IBM Plex Mono" fo:font-size="7pt" fo:color="#152D5C" fo:letter-spacing="0.1em" fo:text-transform="uppercase"/>
      <style:paragraph-properties fo:margin-bottom="0.2cm"/>
    </style:style>
    <style:style style:name="SummaryH2" style:family="paragraph" style:parent-style-name="Standard">
      <style:text-properties style:font-name="Figtree" fo:font-size="14pt" fo:font-weight="bold" fo:color="#0A172F"/>
      <style:paragraph-properties fo:line-height="125%" fo:margin-bottom="0.3cm"/>
    </style:style>
    <style:style style:name="SummaryBody" style:family="paragraph" style:parent-style-name="Standard">
      <style:text-properties style:font-name="Figtree" fo:font-size="10pt" fo:color="#0A172F"/>
      <style:paragraph-properties fo:line-height="155%" fo:margin-bottom="0.4cm"/>
    </style:style>
    <style:style style:name="SummaryBullet" style:family="paragraph" style:parent-style-name="Standard">
      <style:text-properties style:font-name="Figtree" fo:font-size="9.5pt" fo:color="#0A172F"/>
      <style:paragraph-properties fo:line-height="150%" fo:margin-left="0.5cm" fo:text-indent="-0.5cm" fo:margin-bottom="0.15cm"/>
    </style:style>
    <style:style style:name="SignedName" style:family="paragraph" style:parent-style-name="Standard">
      <style:text-properties style:font-name="Figtree" fo:font-size="10pt" fo:font-weight="600" fo:color="#0A172F"/>
      <style:paragraph-properties fo:margin-bottom="0cm"/>
    </style:style>
    <style:style style:name="SignedRole" style:family="paragraph" style:parent-style-name="Standard">
      <style:text-properties style:font-name="Figtree" fo:font-size="8pt" fo:color="#152D5C"/>
      <style:paragraph-properties fo:margin-bottom="0cm"/>
    </style:style>
    <style:style style:name="SignedMeta" style:family="paragraph" style:parent-style-name="Standard">
      <style:text-properties style:font-name="IBM Plex Mono" fo:font-size="7pt" fo:color="#4D69A4" fo:letter-spacing="0.06em"/>
      <style:paragraph-properties fo:margin-bottom="0cm" fo:text-align="end"/>
    </style:style>
    <style:style style:name="SignedMetaValue" style:family="paragraph" style:parent-style-name="Standard">
      <style:text-properties style:font-name="Figtree" fo:font-size="9pt" fo:color="#0A172F"/>
      <style:paragraph-properties fo:margin-bottom="0cm" fo:text-align="end"/>
    </style:style>
    <!-- Signed-by name + role, indented past the page-anchored avatar
         hex on the left and reserving room for the Opgesteld/date
         meta frame on the right. -->
    <style:style style:name="SignedNameInCard" style:family="paragraph" style:parent-style-name="SignedName">
      <style:paragraph-properties fo:margin-left="1.9cm" fo:margin-right="4cm" fo:margin-bottom="0.1cm"/>
    </style:style>
    <style:style style:name="SignedRoleInCard" style:family="paragraph" style:parent-style-name="SignedRole">
      <style:paragraph-properties fo:margin-left="1.9cm" fo:margin-right="4cm" fo:margin-bottom="0cm"/>
    </style:style>
    <!-- ==== Body content ==== -->
    <style:style style:name="BodyH2" style:family="paragraph" style:parent-style-name="Standard">
      <style:text-properties style:font-name="Figtree" fo:font-size="18pt" fo:font-weight="bold" fo:color="#0A172F" fo:letter-spacing="-0.01em"/>
      <style:paragraph-properties fo:margin-top="0.2cm" fo:margin-bottom="0.4cm"/>
    </style:style>
    <style:style style:name="BodyH3" style:family="paragraph" style:parent-style-name="Standard">
      <style:text-properties style:font-name="Figtree" fo:font-size="11pt" fo:font-weight="600" fo:color="#152D5C"/>
      <style:paragraph-properties fo:margin-top="0.6cm" fo:margin-bottom="0.2cm"/>
    </style:style>
    <style:style style:name="BodyText" style:family="paragraph" style:parent-style-name="Standard">
      <style:text-properties style:font-name="Figtree" fo:font-size="10pt" fo:color="#0A172F"/>
      <style:paragraph-properties fo:line-height="160%" fo:margin-bottom="0.3cm"/>
    </style:style>
    <style:style style:name="BodyQuote" style:family="paragraph" style:parent-style-name="Standard">
      <style:text-properties style:font-name="Figtree" fo:font-size="10pt" fo:color="#152D5C" fo:font-style="italic"/>
      <style:paragraph-properties fo:line-height="155%" fo:margin-top="0.5cm" fo:margin-bottom="0.5cm" fo:margin-left="0.5cm" fo:padding-left="0.5cm" fo:border-left="0.08cm solid #F36C21"/>
    </style:style>
    <style:style style:name="BodyBullet" style:family="paragraph" style:parent-style-name="Standard">
      <style:text-properties style:font-name="Figtree" fo:font-size="10pt" fo:color="#0A172F"/>
      <style:paragraph-properties fo:line-height="155%" fo:margin-left="0.5cm" fo:text-indent="-0.5cm" fo:margin-bottom="0.12cm"/>
    </style:style>
    <!-- Callout uses paragraph-level bg + left border so it flows with
         body content; an anchored draw:frame wouldn't follow shifting
         text above it. The two paragraphs share a continuous bg by
         joining their borders/padding.  -->
    <style:style style:name="CalloutLabel" style:family="paragraph" style:parent-style-name="Standard">
      <style:text-properties style:font-name="IBM Plex Mono" fo:font-size="7pt" fo:color="#152D5C" fo:letter-spacing="0.08em" fo:text-transform="uppercase"/>
      <style:paragraph-properties fo:background-color="#EEF2F8" fo:border-left="0.08cm solid #21468B" fo:padding-top="0.45cm" fo:padding-right="0.5cm" fo:padding-bottom="0.15cm" fo:padding-left="0.5cm" fo:margin-top="0.5cm" fo:margin-bottom="0cm" style:join-border="true"/>
    </style:style>
    <style:style style:name="CalloutBody" style:family="paragraph" style:parent-style-name="Standard">
      <style:text-properties style:font-name="Figtree" fo:font-size="9.5pt" fo:color="#0A172F"/>
      <style:paragraph-properties fo:background-color="#EEF2F8" fo:border-left="0.08cm solid #21468B" fo:padding-top="0cm" fo:padding-right="0.5cm" fo:padding-bottom="0.45cm" fo:padding-left="0.5cm" fo:line-height="155%" fo:margin-top="0cm" fo:margin-bottom="0.5cm" style:join-border="true"/>
    </style:style>
    <style:style style:name="PageFootR" style:family="paragraph" style:parent-style-name="Standard">
      <style:text-properties style:font-name="IBM Plex Mono" fo:font-size="7pt" fo:color="#4D69A4" fo:letter-spacing="0.06em"/>
      <style:paragraph-properties fo:margin-top="1cm" fo:padding-top="0.2cm" fo:border-top="0.03cm solid #DCE3F0"/>
    </style:style>
    <!-- ==== Back page ==== -->
    <style:style style:name="BackH2" style:family="paragraph" style:parent-style-name="Standard">
      <style:text-properties style:font-name="Figtree" fo:font-size="22pt" fo:font-weight="bold" fo:color="#0A172F" fo:letter-spacing="-0.015em"/>
      <style:paragraph-properties fo:margin-bottom="0.2cm"/>
    </style:style>
    <style:style style:name="BackSub" style:family="paragraph" style:parent-style-name="Standard">
      <style:text-properties style:font-name="Figtree" fo:font-size="11pt" fo:color="#152D5C"/>
      <style:paragraph-properties fo:line-height="150%" fo:margin-bottom="0.8cm"/>
    </style:style>
    <style:style style:name="NextCardNum" style:family="paragraph" style:parent-style-name="Standard">
      <style:text-properties style:font-name="IBM Plex Mono" fo:font-size="7pt" fo:color="#4D69A4" fo:letter-spacing="0.08em"/>
      <style:paragraph-properties fo:margin-bottom="0.1cm"/>
    </style:style>
    <style:style style:name="NextCardH" style:family="paragraph" style:parent-style-name="Standard">
      <style:text-properties style:font-name="Figtree" fo:font-size="11pt" fo:font-weight="600" fo:color="#0A172F"/>
      <style:paragraph-properties fo:margin-bottom="0.15cm"/>
    </style:style>
    <style:style style:name="NextCardBody" style:family="paragraph" style:parent-style-name="Standard">
      <style:text-properties style:font-name="Figtree" fo:font-size="9pt" fo:color="#152D5C"/>
      <style:paragraph-properties fo:line-height="145%" fo:margin-bottom="0.3cm"/>
    </style:style>
    <style:style style:name="NextCardMeta" style:family="paragraph" style:parent-style-name="Standard">
      <style:text-properties style:font-name="IBM Plex Mono" fo:font-size="7pt" fo:color="#4D69A4" fo:letter-spacing="0.06em"/>
      <style:paragraph-properties fo:margin-bottom="0cm" fo:padding-top="0.2cm" fo:border-top="0.03cm solid #DCE3F0"/>
    </style:style>
    <style:style style:name="ContactName" style:family="paragraph" style:parent-style-name="Standard">
      <style:text-properties style:font-name="Figtree" fo:font-size="13pt" fo:font-weight="bold" fo:color="#0A172F"/>
      <style:paragraph-properties fo:margin-bottom="0.1cm"/>
    </style:style>
    <style:style style:name="ContactRole" style:family="paragraph" style:parent-style-name="Standard">
      <style:text-properties style:font-name="Figtree" fo:font-size="9pt" fo:color="#152D5C"/>
      <style:paragraph-properties fo:margin-bottom="0.2cm"/>
    </style:style>
    <style:style style:name="ContactLines" style:family="paragraph" style:parent-style-name="Standard">
      <style:text-properties style:font-name="IBM Plex Mono" fo:font-size="8pt" fo:color="#152D5C"/>
      <style:paragraph-properties fo:line-height="150%" fo:margin-bottom="0cm"/>
    </style:style>
    <!-- Indented variants used inside the contact card: leave 2.6cm
         on the left for the hex avatar and 3cm on the right for the QR. -->
    <style:style style:name="ContactNameIn" style:family="paragraph" style:parent-style-name="ContactName">
      <style:paragraph-properties fo:margin-left="2.6cm" fo:margin-right="3cm" fo:margin-bottom="0.1cm"/>
    </style:style>
    <style:style style:name="ContactRoleIn" style:family="paragraph" style:parent-style-name="ContactRole">
      <style:paragraph-properties fo:margin-left="2.6cm" fo:margin-right="3cm" fo:margin-bottom="0.25cm"/>
    </style:style>
    <style:style style:name="ContactLinesIn" style:family="paragraph" style:parent-style-name="ContactLines">
      <style:paragraph-properties fo:margin-left="2.6cm" fo:margin-right="3cm" fo:margin-bottom="0cm"/>
    </style:style>
    <style:style style:name="BackFoot" style:family="paragraph" style:parent-style-name="Standard">
      <style:text-properties style:font-name="IBM Plex Mono" fo:font-size="7pt" fo:color="#4D69A4" fo:letter-spacing="0.1em" fo:text-transform="uppercase"/>
      <style:paragraph-properties fo:text-align="center" fo:margin-top="0.6cm"/>
    </style:style>
    <!-- ==== Text styles (inline) ==== -->
    <style:style style:name="AccentOrange" style:family="text">
      <style:text-properties fo:color="#F36C21" fo:font-weight="bold"/>
    </style:style>
    <style:style style:name="DocIdOrange" style:family="text">
      <style:text-properties fo:color="#F36C21" style:font-name="IBM Plex Mono"/>
    </style:style>
    <style:style style:name="BoldInline" style:family="text">
      <style:text-properties fo:font-weight="bold"/>
    </style:style>
    <style:style style:name="AvatarText" style:family="text">
      <style:text-properties fo:color="#FFFFFF" fo:font-weight="bold" fo:font-size="9pt"/>
    </style:style>
    <!-- ==== Graphic style: anchored hex / images on page ==== -->
    <style:style style:name="HexAnchored" style:family="graphic">
      <style:graphic-properties style:wrap="none" style:vertical-pos="from-top" style:vertical-rel="page" style:horizontal-pos="from-left" style:horizontal-rel="page" draw:opacity="100%"/>
    </style:style>
    <!-- White card with cobalt-100 outline, anchored to page. The
         auto-grow=false pair locks the frame fill to its declared
         svg:width/height so it doesn't shrink-to-content (which would
         leave the veil showing through the bottom strip of the card). -->
    <style:style style:name="WhiteCard" style:family="graphic">
      <style:graphic-properties draw:fill="solid" draw:fill-color="#FFFFFF" draw:stroke="solid" svg:stroke-width="0.05cm" svg:stroke-color="#DCE3F0" fo:padding-top="0.7cm" fo:padding-right="0.9cm" fo:padding-bottom="0.7cm" fo:padding-left="1cm" draw:auto-grow-height="false" draw:auto-grow-width="false" style:wrap="none" style:run-through="foreground" style:vertical-pos="from-top" style:vertical-rel="page" style:horizontal-pos="from-left" style:horizontal-rel="page"/>
    </style:style>
    <!-- Text frame stacked on top of a card-bg image. fill is set to
         WHITE (not "none") because draw:fill="none" in LibreOffice
         causes the text frame to render with auto-shrunken bg behavior
         that masks the underlying bg image below the text. A solid
         white fill avoids the issue and matches the card bg behind it. -->
    <style:style style:name="TextFramePadded" style:family="graphic">
      <style:graphic-properties draw:fill="solid" draw:fill-color="#FFFFFF" draw:stroke="none" fo:padding-top="0.7cm" fo:padding-right="0.9cm" fo:padding-bottom="0.7cm" fo:padding-left="1cm" draw:auto-grow-height="false" style:wrap="none" style:run-through="foreground" style:vertical-pos="from-top" style:vertical-rel="page" style:horizontal-pos="from-left" style:horizontal-rel="page"/>
    </style:style>
    <!-- White-fill overlay for Path 2: covers the baked placeholder text
         in the chrome PNG with a solid white block, then renders the
         editable text on top. Anchored at fixed page coordinates
         measured from the HTML. --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!-- Tinted callout box (cobalt-50 fill, no stroke), anchored to page. -->
    <style:style style:name="TintCard" style:family="graphic">
      <style:graphic-properties draw:fill="solid" draw:fill-color="#EEF2F8" draw:stroke="none" fo:padding-top="0.45cm" fo:padding-right="0.7cm" fo:padding-bottom="0.45cm" fo:padding-left="0.7cm" style:wrap="none" style:run-through="foreground" style:vertical-pos="from-top" style:vertical-rel="page" style:horizontal-pos="from-left" style:horizontal-rel="page"/>
    </style:style>
    <!-- Cobalt accent strip (used as left bar on summary panel). The
         draw:rect needs minimum metadata or LibreOffice clamps height to
         a default; the explicit fill + non-zero stroke (then disabled)
         keeps it from collapsing. -->
    <style:style style:name="BarCobalt" style:family="graphic">
      <style:graphic-properties draw:fill="solid" draw:fill-color="#21468B" draw:stroke="solid" svg:stroke-width="0.01cm" svg:stroke-color="#21468B" style:wrap="none" style:run-through="foreground" style:vertical-pos="from-top" style:vertical-rel="page" style:horizontal-pos="from-left" style:horizontal-rel="page"/>
    </style:style>
    <!-- KNVB-orange accent strip (used as left bar on next-cards). -->
    <style:style style:name="BarOrange" style:family="graphic">
      <style:graphic-properties draw:fill="solid" draw:fill-color="#F36C21" draw:stroke="solid" svg:stroke-width="0.01cm" svg:stroke-color="#F36C21" style:wrap="none" style:run-through="foreground" style:vertical-pos="from-top" style:vertical-rel="page" style:horizontal-pos="from-left" style:horizontal-rel="page"/>
    </style:style>
    <style:style style:name="HexBgAnchored" style:family="graphic">
      <style:graphic-properties style:wrap="run-through" style:run-through="background" style:vertical-pos="from-top" style:vertical-rel="page" style:horizontal-pos="from-left" style:horizontal-rel="page" draw:opacity="100%"/>
    </style:style>
    <!-- ==== Table styles: summary panel, callout, next cards, contact ==== -->
    <!-- Summary panel: white card with cobalt-100 outline + thick
         cobalt left bar set on the cell directly. Cell-level borders
         render reliably; table-level borders do not in some viewers. -->
    <style:style style:name="TSummary" style:family="table">
      <style:table-properties style:width="16.6cm" table:align="margins" fo:background-color="#FFFFFF"/>
    </style:style>
    <style:style style:name="TSummary.A" style:family="table-column">
      <style:table-column-properties style:column-width="16.6cm"/>
    </style:style>
    <style:style style:name="TSummary.Cell" style:family="table-cell">
      <style:table-cell-properties fo:padding="0.7cm 0.9cm" fo:background-color="#FFFFFF" fo:border-top="0.05cm solid #DCE3F0" fo:border-right="0.05cm solid #DCE3F0" fo:border-bottom="0.05cm solid #DCE3F0" fo:border-left="0.15cm solid #21468B"/>
    </style:style>
    <!-- TSummaryPanel: text-flow summary panel used on the veiled summary
         page. White cell fill draws above the page-bg PNG (the honeycomb
         veil). Cell borders give the cobalt-100 outline and the cobalt-700
         left bar without needing separate overlay frames. -->
    <style:style style:name="TSummaryPanel" style:family="table">
      <style:table-properties style:width="16.6cm" table:align="margins" fo:background-color="#FFFFFF"/>
    </style:style>
    <style:style style:name="TSummaryPanel.A" style:family="table-column">
      <style:table-column-properties style:column-width="16.6cm"/>
    </style:style>
    <style:style style:name="TSummaryPanel.Cell" style:family="table-cell">
      <style:table-cell-properties fo:padding="0.8cm 1cm 0.8cm 1.2cm" fo:background-color="#FFFFFF" fo:border-top="0.05cm solid #DCE3F0" fo:border-right="0.05cm solid #DCE3F0" fo:border-bottom="0.05cm solid #DCE3F0"/>
    </style:style>
    <!-- Callout: cobalt-50 tinted box with cobalt left bar (cell-level). -->
    <style:style style:name="TCallout" style:family="table">
      <style:table-properties style:width="16.6cm" table:align="margins" fo:background-color="#EEF2F8"/>
    </style:style>
    <style:style style:name="TCallout.A" style:family="table-column">
      <style:table-column-properties style:column-width="16.6cm"/>
    </style:style>
    <style:style style:name="TCallout.Cell" style:family="table-cell">
      <style:table-cell-properties fo:padding="0.5cm 0.7cm" fo:background-color="#EEF2F8" fo:border-left="0.1cm solid #21468B"/>
    </style:style>
    <!-- Next-cards: 3 white cards each with an orange left bar. -->
    <style:style style:name="TNext" style:family="table">
      <style:table-properties style:width="16.6cm" table:align="margins"/>
    </style:style>
    <style:style style:name="TNext.A" style:family="table-column">
      <style:table-column-properties style:column-width="5.33cm"/>
    </style:style>
    <style:style style:name="TNext.Gap" style:family="table-column">
      <style:table-column-properties style:column-width="0.3cm"/>
    </style:style>
    <style:style style:name="TNext.Cell" style:family="table-cell">
      <style:table-cell-properties fo:padding="0.6cm 0.5cm" fo:background-color="#FFFFFF" fo:border-left="0.15cm solid #F36C21"/>
    </style:style>
    <style:style style:name="TNext.GapCell" style:family="table-cell">
      <style:table-cell-properties fo:padding="0cm"/>
    </style:style>
    <style:style style:name="TContact" style:family="table">
      <style:table-properties style:width="16.6cm" table:align="margins" fo:background-color="#FFFFFF"/>
    </style:style>
    <style:style style:name="TContact.Av" style:family="table-column">
      <style:table-column-properties style:column-width="2.4cm"/>
    </style:style>
    <style:style style:name="TContact.Who" style:family="table-column">
      <style:table-column-properties style:column-width="11.4cm"/>
    </style:style>
    <style:style style:name="TContact.QR" style:family="table-column">
      <style:table-column-properties style:column-width="2.8cm"/>
    </style:style>
    <style:style style:name="TContact.Cell" style:family="table-cell">
      <style:table-cell-properties fo:padding="0.8cm" fo:background-color="#FFFFFF"/>
    </style:style>
    <style:style style:name="TContact.CellTight" style:family="table-cell">
      <style:table-cell-properties fo:padding="0.6cm 0.4cm" fo:background-color="#FFFFFF"/>
    </style:style>
    <style:style style:name="TSigned" style:family="table">
      <style:table-properties style:width="15.4cm" table:align="margins" fo:border-top="0.03cm solid #DCE3F0"/>
    </style:style>
    <style:style style:name="TSigned.Av" style:family="table-column">
      <style:table-column-properties style:column-width="1.8cm"/>
    </style:style>
    <style:style style:name="TSigned.Who" style:family="table-column">
      <style:table-column-properties style:column-width="9cm"/>
    </style:style>
    <style:style style:name="TSigned.Meta" style:family="table-column">
      <style:table-column-properties style:column-width="4.6cm"/>
    </style:style>
    <style:style style:name="TSigned.Cell" style:family="table-cell">
      <style:table-cell-properties fo:padding="0.4cm 0.3cm 0cm 0cm"/>
    </style:style>
  </office:styles>
  <office:automatic-styles>
    <!-- Cover page: A4, cobalt-900 fill, generous side margins -->
    <style:page-layout style:name="PL_Cover">
      <style:page-layout-properties fo:page-width="21cm" fo:page-height="29.7cm" style:print-orientation="portrait" fo:margin-top="3.6cm" fo:margin-right="2.2cm" fo:margin-bottom="2.2cm" fo:margin-left="2.2cm" fo:background-color="#0A172F"/>
    </style:page-layout>
    <!-- Summary page: A4. Page bg is the baked summary-chrome.png that
         contains everything visual (veil + white card + cobalt left bar +
         hex bullets + static labels + divider + 'Opgesteld' + page foot
         prefix). Path 2 — all editable text is overlaid as anchored text
         frames whose svg:x / svg:y match coordinates measured from the
         HTML report.html summary page via Playwright. -->
    <style:page-layout style:name="PL_Summary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summary-chrome.png" xlink:type="simple" xlink:actuate="onLoad" style:position="top left" style:repeat="no-repeat"/>
      </style:page-layout-properties>
    </style:page-layout>
    <!-- Body page: same geometry as summary, no veil -->
    <style:page-layout style:name="PL_Body">
      <style:page-layout-properties fo:page-width="21cm" fo:page-height="29.7cm" style:print-orientation="portrait" fo:margin-top="1.6cm" fo:margin-right="2.2cm" fo:margin-bottom="2.2cm" fo:margin-left="2.2cm" fo:background-color="#FFFFFF"/>
    </style:page-layout>
    <!-- New page-layouts (Phase 2) — each backs onto a chrome PNG
         pre-rendered from the HTML template via Playwright. Same A4
         geometry as the body page (1.6cm top, 2.2cm sides + bottom). -->
    <style:page-layout style:name="PL_Index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dex-chrome.png" xlink:type="simple" xlink:actuate="onLoad" style:position="top left" style:repeat="no-repeat"/>
      </style:page-layout-properties>
    </style:page-layout>
    <style:page-layout style:name="PL_Quot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quote-chrome.png" xlink:type="simple" xlink:actuate="onLoad" style:position="top left" style:repeat="no-repeat"/>
      </style:page-layout-properties>
    </style:page-layout>
    <style:page-layout style:name="PL_Diagram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diagram-chrome.png" xlink:type="simple" xlink:actuate="onLoad" style:position="top left" style:repeat="no-repeat"/>
      </style:page-layout-properties>
    </style:page-layout>
    <style:page-layout style:name="PL_Tabl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table-chrome.png" xlink:type="simple" xlink:actuate="onLoad" style:position="top left" style:repeat="no-repeat"/>
      </style:page-layout-properties>
    </style:page-layout>
    <style:page-layout style:name="PL_InfoStd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std-chrome.png" xlink:type="simple" xlink:actuate="onLoad" style:position="top left" style:repeat="no-repeat"/>
      </style:page-layout-properties>
    </style:page-layout>
    <style:page-layout style:name="PL_InfoPlayful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playful-chrome.png" xlink:type="simple" xlink:actuate="onLoad" style:position="top left" style:repeat="no-repeat"/>
      </style:page-layout-properties>
    </style:page-layout>
    <style:page-layout style:name="PL_Source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sources-chrome.png" xlink:type="simple" xlink:actuate="onLoad" style:position="top left" style:repeat="no-repeat"/>
      </style:page-layout-properties>
    </style:page-layout>
    <style:page-layout style:name="PL_Attachment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attachments-chrome.png" xlink:type="simple" xlink:actuate="onLoad" style:position="top left" style:repeat="no-repeat"/>
      </style:page-layout-properties>
    </style:page-layout>
    <!-- Back page: A4, cobalt-50 fill -->
    <style:page-layout style:name="PL_Back">
      <style:page-layout-properties fo:page-width="21cm" fo:page-height="29.7cm" style:print-orientation="portrait" fo:margin-top="2.2cm" fo:margin-right="2.2cm" fo:margin-bottom="2.2cm" fo:margin-left="2.2cm" fo:background-color="#EEF2F8"/>
    </style:page-layout>
  </office:automatic-styles>
  <office:master-styles>
    <style:master-page style:name="MP_Cover" style:page-layout-name="PL_Cover"/>
    <style:master-page style:name="MP_Index" style:page-layout-name="PL_Index"/>
    <style:master-page style:name="MP_Summary" style:page-layout-name="PL_Summary"/>
    <style:master-page style:name="MP_Body" style:page-layout-name="PL_Body"/>
    <style:master-page style:name="MP_Quote" style:page-layout-name="PL_Quote"/>
    <style:master-page style:name="MP_Diagram" style:page-layout-name="PL_Diagram"/>
    <style:master-page style:name="MP_Table" style:page-layout-name="PL_Table"/>
    <style:master-page style:name="MP_InfoStd" style:page-layout-name="PL_InfoStd"/>
    <style:master-page style:name="MP_InfoPlayful" style:page-layout-name="PL_InfoPlayful"/>
    <style:master-page style:name="MP_Sources" style:page-layout-name="PL_Sources"/>
    <style:master-page style:name="MP_Attachments" style:page-layout-name="PL_Attachments"/>
    <style:master-page style:name="MP_Back" style:page-layout-name="PL_Back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port · Conduction</dc:title>
    <dc:subject>Three-sheet consultant report (cover, body, back) on Conduction brand</dc:subject>
    <dc:creator>Conduction</dc:creator>
    <meta:keyword>conduction</meta:keyword>
    <meta:keyword>report</meta:keyword>
    <meta:keyword>brand</meta:keyword>
  </office:meta>
</office:document-meta>
</file>